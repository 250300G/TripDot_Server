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5.075cm" table:align="left"/>
    </style:style>
    <style:style style:name="Tableau1.A" style:family="table-column">
      <style:table-column-properties style:column-width="3.067cm"/>
    </style:style>
    <style:style style:name="Tableau1.B" style:family="table-column">
      <style:table-column-properties style:column-width="2.007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5.075cm" table:align="left"/>
    </style:style>
    <style:style style:name="Tableau2.A" style:family="table-column">
      <style:table-column-properties style:column-width="3.067cm"/>
    </style:style>
    <style:style style:name="Tableau2.B" style:family="table-column">
      <style:table-column-properties style:column-width="2.007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9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10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1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2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3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4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5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6">
      <style:paragraph-properties fo:margin-top="0cm" fo:margin-bottom="0cm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7">
      <style:paragraph-properties fo:margin-top="0cm" fo:margin-bottom="0cm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8">
      <style:paragraph-properties fo:margin-top="0cm" fo:margin-bottom="0cm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9">
      <style:paragraph-properties fo:margin-top="0cm" fo:margin-bottom="0cm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20">
      <style:paragraph-properties fo:margin-top="0cm" fo:margin-bottom="0cm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1">
      <style:paragraph-properties fo:margin-top="0cm" fo:margin-bottom="0cm" style:contextual-spacing="false"/>
    </style:style>
    <style:style style:name="P41" style:family="paragraph" style:parent-style-name="Text_20_body" style:list-style-name="L21"/>
    <style:style style:name="P42" style:family="paragraph" style:parent-style-name="Text_20_body" style:list-style-name="L22">
      <style:paragraph-properties fo:margin-top="0cm" fo:margin-bottom="0cm" style:contextual-spacing="false"/>
    </style:style>
    <style:style style:name="P43" style:family="paragraph" style:parent-style-name="Text_20_body" style:list-style-name="L22"/>
    <style:style style:name="P44" style:family="paragraph" style:parent-style-name="Text_20_body">
      <style:paragraph-properties fo:margin-left="0cm" fo:margin-right="0cm" fo:text-indent="0cm" style:auto-text-indent="false"/>
    </style:style>
    <style:style style:name="P4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6" style:family="paragraph" style:parent-style-name="Text_20_body">
      <style:paragraph-properties fo:margin-top="0cm" fo:margin-bottom="0cm" style:contextual-spacing="false"/>
    </style:style>
    <style:style style:name="P47" style:family="paragraph">
      <style:paragraph-properties fo:text-align="left"/>
      <style:text-properties fo:font-family="'Liberation Mono'" style:font-family-generic="modern" style:font-pitch="fixed" fo:font-size="10pt"/>
    </style:style>
    <style:style style:name="P48" style:family="paragraph">
      <style:paragraph-properties fo:text-align="left"/>
      <style:text-properties style:text-line-through-style="none" style:text-line-through-type="none" fo:font-family="'Liberation Mono'" style:font-family-generic="modern" style:font-pitch="fixed" fo:font-size="10pt" fo:font-style="normal" style:text-underline-style="none"/>
    </style:style>
    <style:style style:name="P49" style:family="paragraph" style:parent-style-name="Text_20_body" style:list-style-name="L23">
      <style:paragraph-properties fo:margin-top="0cm" fo:margin-bottom="0cm" style:contextual-spacing="false"/>
    </style:style>
    <style:style style:name="P50" style:family="paragraph" style:parent-style-name="Text_20_body" style:list-style-name="L23"/>
    <style:style style:name="P51" style:family="paragraph" style:parent-style-name="Text_20_body" style:list-style-name="L24">
      <style:paragraph-properties fo:margin-top="0cm" fo:margin-bottom="0cm" style:contextual-spacing="false"/>
    </style:style>
    <style:style style:name="P52" style:family="paragraph" style:parent-style-name="Text_20_body" style:list-style-name="L24"/>
    <style:style style:name="P53" style:family="paragraph" style:parent-style-name="Text_20_body" style:list-style-name="L25">
      <style:paragraph-properties fo:margin-top="0cm" fo:margin-bottom="0cm" style:contextual-spacing="false"/>
    </style:style>
    <style:style style:name="P54" style:family="paragraph" style:parent-style-name="Text_20_body" style:list-style-name="L25"/>
    <style:style style:name="P55" style:family="paragraph" style:parent-style-name="Text_20_body" style:list-style-name="L26">
      <style:paragraph-properties fo:margin-top="0cm" fo:margin-bottom="0cm" style:contextual-spacing="false"/>
    </style:style>
    <style:style style:name="P56" style:family="paragraph" style:parent-style-name="Text_20_body" style:list-style-name="L26"/>
    <style:style style:name="P57" style:family="paragraph" style:parent-style-name="Text_20_body" style:list-style-name="L27">
      <style:paragraph-properties fo:margin-top="0cm" fo:margin-bottom="0cm" style:contextual-spacing="false"/>
    </style:style>
    <style:style style:name="P58" style:family="paragraph" style:parent-style-name="Text_20_body" style:list-style-name="L27"/>
    <style:style style:name="P59" style:family="paragraph" style:parent-style-name="Text_20_body" style:list-style-name="L28">
      <style:paragraph-properties fo:margin-top="0cm" fo:margin-bottom="0cm" style:contextual-spacing="false"/>
    </style:style>
    <style:style style:name="P60" style:family="paragraph" style:parent-style-name="Text_20_body" style:list-style-name="L28"/>
    <style:style style:name="P61" style:family="paragraph" style:parent-style-name="Text_20_body" style:list-style-name="L29"/>
    <style:style style:name="P62" style:family="paragraph" style:parent-style-name="Text_20_body" style:list-style-name="L30">
      <style:paragraph-properties fo:margin-top="0cm" fo:margin-bottom="0cm" style:contextual-spacing="false"/>
    </style:style>
    <style:style style:name="P63" style:family="paragraph" style:parent-style-name="Text_20_body" style:list-style-name="L30"/>
    <style:style style:name="P64" style:family="paragraph" style:parent-style-name="Text_20_body" style:list-style-name="L31">
      <style:paragraph-properties fo:margin-top="0cm" fo:margin-bottom="0cm" style:contextual-spacing="false"/>
    </style:style>
    <style:style style:name="P65" style:family="paragraph" style:parent-style-name="Text_20_body" style:list-style-name="L31"/>
    <style:style style:name="P66" style:family="paragraph" style:parent-style-name="Text_20_body" style:list-style-name="L32">
      <style:paragraph-properties fo:margin-top="0cm" fo:margin-bottom="0cm" style:contextual-spacing="false"/>
    </style:style>
    <style:style style:name="P67" style:family="paragraph" style:parent-style-name="Text_20_body" style:list-style-name="L32"/>
    <style:style style:name="P68" style:family="paragraph" style:parent-style-name="Text_20_body" style:list-style-name="L33">
      <style:paragraph-properties fo:margin-top="0cm" fo:margin-bottom="0cm" style:contextual-spacing="false"/>
    </style:style>
    <style:style style:name="P69" style:family="paragraph" style:parent-style-name="Text_20_body" style:list-style-name="L33"/>
    <style:style style:name="P70" style:family="paragraph" style:parent-style-name="Text_20_body" style:list-style-name="L34">
      <style:paragraph-properties fo:margin-top="0cm" fo:margin-bottom="0cm" style:contextual-spacing="false"/>
    </style:style>
    <style:style style:name="P71" style:family="paragraph" style:parent-style-name="Text_20_body" style:list-style-name="L34"/>
    <style:style style:name="P72" style:family="paragraph" style:parent-style-name="Text_20_body" style:list-style-name="L35">
      <style:paragraph-properties fo:margin-top="0cm" fo:margin-bottom="0cm" style:contextual-spacing="false"/>
    </style:style>
    <style:style style:name="P73" style:family="paragraph" style:parent-style-name="Text_20_body" style:list-style-name="L35"/>
    <style:style style:name="P74" style:family="paragraph" style:parent-style-name="Text_20_body" style:list-style-name="L36">
      <style:paragraph-properties fo:margin-top="0cm" fo:margin-bottom="0cm" style:contextual-spacing="false"/>
    </style:style>
    <style:style style:name="P75" style:family="paragraph" style:parent-style-name="Text_20_body" style:list-style-name="L36"/>
    <style:style style:name="P76" style:family="paragraph" style:parent-style-name="Text_20_body" style:list-style-name="L37">
      <style:paragraph-properties fo:margin-top="0cm" fo:margin-bottom="0cm" style:contextual-spacing="false"/>
    </style:style>
    <style:style style:name="P77" style:family="paragraph" style:parent-style-name="Text_20_body" style:list-style-name="L37"/>
    <style:style style:name="P78" style:family="paragraph" style:parent-style-name="Text_20_body" style:list-style-name="L38">
      <style:paragraph-properties fo:margin-top="0cm" fo:margin-bottom="0cm" style:contextual-spacing="false"/>
    </style:style>
    <style:style style:name="P79" style:family="paragraph" style:parent-style-name="Text_20_body" style:list-style-name="L38"/>
    <style:style style:name="P80" style:family="paragraph" style:parent-style-name="Text_20_body" style:list-style-name="L39">
      <style:paragraph-properties fo:margin-top="0cm" fo:margin-bottom="0cm" style:contextual-spacing="false"/>
    </style:style>
    <style:style style:name="P81" style:family="paragraph" style:parent-style-name="Text_20_body" style:list-style-name="L39"/>
    <style:style style:name="P82" style:family="paragraph" style:parent-style-name="Text_20_body" style:list-style-name="L40">
      <style:paragraph-properties fo:margin-top="0cm" fo:margin-bottom="0cm" style:contextual-spacing="false"/>
    </style:style>
    <style:style style:name="P83" style:family="paragraph" style:parent-style-name="Text_20_body" style:list-style-name="L40"/>
    <style:style style:name="P84" style:family="paragraph" style:parent-style-name="Text_20_body" style:list-style-name="L41">
      <style:paragraph-properties fo:margin-top="0cm" fo:margin-bottom="0cm" style:contextual-spacing="false"/>
    </style:style>
    <style:style style:name="P85" style:family="paragraph" style:parent-style-name="Text_20_body" style:list-style-name="L41"/>
    <style:style style:name="P86" style:family="paragraph" style:parent-style-name="Text_20_body" style:list-style-name="L42">
      <style:paragraph-properties fo:margin-top="0cm" fo:margin-bottom="0cm" style:contextual-spacing="false"/>
    </style:style>
    <style:style style:name="P87" style:family="paragraph" style:parent-style-name="Text_20_body" style:list-style-name="L42"/>
    <style:style style:name="P88" style:family="paragraph" style:parent-style-name="Text_20_body" style:list-style-name="L43">
      <style:paragraph-properties fo:margin-top="0cm" fo:margin-bottom="0cm" style:contextual-spacing="false"/>
    </style:style>
    <style:style style:name="P89" style:family="paragraph" style:parent-style-name="Text_20_body" style:list-style-name="L43"/>
    <style:style style:name="P90" style:family="paragraph" style:parent-style-name="Text_20_body" style:list-style-name="L44">
      <style:paragraph-properties fo:margin-top="0cm" fo:margin-bottom="0cm" style:contextual-spacing="false"/>
    </style:style>
    <style:style style:name="P91" style:family="paragraph" style:parent-style-name="Text_20_body" style:list-style-name="L44"/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loext:decorative="false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le form:control-implementation="ooo:com.sun.star.form.component.FileControl" xml:id="control1" form:id="control1"/>
          <form:textarea form:name="prompt-textarea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le form:control-implementation="ooo:com.sun.star.form.component.FileControl" xml:id="control3" form:id="control3"/>
          <form:textarea form:name="prompt-textarea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🧭 TRAVEL PLANNER APP — REVUE 360° (MVP 8 JOURS)</text:h>
      <text:h text:style-name="Heading_20_2" text:outline-level="2">🧩 1. CONCEPT PRODUIT</text:h>
      <text:p text:style-name="Text_20_body">Application SPA permettant de :</text:p>
      <text:list text:style-name="L1">
        <text:list-item>
          <text:p text:style-name="P1">créer des voyages (trips) </text:p>
        </text:list-item>
        <text:list-item>
          <text:p text:style-name="P1">générer un itinéraire structuré </text:p>
        </text:list-item>
        <text:list-item>
          <text:p text:style-name="P1">enrichir le voyage avec données externes (météo, lieux) </text:p>
        </text:list-item>
        <text:list-item>
          <text:p text:style-name="P2">organiser activités jour par jour </text:p>
        </text:list-item>
      </text:list>
      <text:p text:style-name="Text_20_body">👉 Positionnement :<text:line-break/><text:span text:style-name="Strong_20_Emphasis">“Planifier un voyage en 5 minutes, pas en 5 heures”</text:span></text:p>
      <text:p text:style-name="Horizontal_20_Line"/>
      <text:h text:style-name="Heading_20_1" text:outline-level="1">🌍 2. MARCHÉ &amp; DEMANDE (VALIDATION BUSINESS)</text:h>
      <text:h text:style-name="Heading_20_2" text:outline-level="2">📈 Demande forte et croissante</text:h>
      <text:list text:style-name="L2">
        <text:list-item>
          <text:p text:style-name="P3">Le marché des apps de voyage dépasse plusieurs milliards et continue de croître fortement (~11% CAGR) </text:p>
        </text:list-item>
        <text:list-item>
          <text:p text:style-name="P3">Les apps de voyage sont devenues un standard : les utilisateurs utilisent 7 à 8 apps pour planifier un voyage </text:p>
        </text:list-item>
        <text:list-item>
          <text:p text:style-name="P4">Forte tendance vers la <text:span text:style-name="Strong_20_Emphasis">planification automatisée et personnalisée</text:span> </text:p>
        </text:list-item>
      </text:list>
      <text:h text:style-name="Heading_20_2" text:outline-level="2">🔥 Problème utilisateur réel</text:h>
      <text:list text:style-name="L3">
        <text:list-item>
          <text:p text:style-name="P5">trop d’onglets / outils (Google, Maps, Airbnb, blogs) </text:p>
        </text:list-item>
        <text:list-item>
          <text:p text:style-name="P5">difficulté à structurer un itinéraire cohérent </text:p>
        </text:list-item>
        <text:list-item>
          <text:p text:style-name="P6">perte de temps importante (pain point constant) </text:p>
        </text:list-item>
      </text:list>
      <text:p text:style-name="Text_20_body">👉 Insight clé :</text:p>
      <text:p text:style-name="Quotations">Le problème n’est pas “trouver des idées de voyage”, mais <text:span text:style-name="Strong_20_Emphasis">les organiser intelligemment</text:span></text:p>
      <text:p text:style-name="Horizontal_20_Line"/>
      <text:h text:style-name="Heading_20_1" text:outline-level="1"><text:soft-page-break/>🏁 3. CONCURRENCE</text:h>
      <text:h text:style-name="Heading_20_2" text:outline-level="2">🥇 Acteurs dominants</text:h>
      <text:list text:style-name="L4">
        <text:list-item>
          <text:p text:style-name="P7">Google Travel </text:p>
        </text:list-item>
        <text:list-item>
          <text:p text:style-name="P7">TripIt </text:p>
        </text:list-item>
        <text:list-item>
          <text:p text:style-name="P7">Kayak </text:p>
        </text:list-item>
        <text:list-item>
          <text:p text:style-name="P7">Skyscanner </text:p>
        </text:list-item>
        <text:list-item>
          <text:p text:style-name="P8">Airbnb Experiences </text:p>
        </text:list-item>
      </text:list>
      <text:h text:style-name="Heading_20_2" text:outline-level="2">⚠️ Analyse concurrence</text:h>
      <text:p text:style-name="Text_20_body">✔ marché <text:span text:style-name="Strong_20_Emphasis">très concurrentiel</text:span><text:line-break/>✔ dominé par grosses plateformes</text:p>
      <text:p text:style-name="Text_20_body">MAIS :</text:p>
      <text:list text:style-name="L5">
        <text:list-item>
          <text:p text:style-name="P9">outils existants = souvent <text:span text:style-name="Strong_20_Emphasis">complexes ou orientés booking</text:span> </text:p>
        </text:list-item>
        <text:list-item>
          <text:p text:style-name="P9">peu d’outils simples “MVP + organisation légère” </text:p>
        </text:list-item>
        <text:list-item>
          <text:p text:style-name="P10">manque d’UX simple pour utilisateurs non experts </text:p>
        </text:list-item>
      </text:list>
      <text:p text:style-name="Text_20_body">👉 Opportunité :<text:line-break/><text:span text:style-name="Strong_20_Emphasis">micro-outil spécialisé = niche exploitable</text:span></text:p>
      <text:p text:style-name="Horizontal_20_Line"/>
      <text:h text:style-name="Heading_20_1" text:outline-level="1">⚙️ 4. SOLUTION TECHNIQUE (IMPORTANT POUR TON ÉCOLE)</text:h>
      <text:h text:style-name="Heading_20_2" text:outline-level="2">🧱 Architecture</text:h>
      <text:h text:style-name="Heading_20_3" text:outline-level="3">Frontend</text:h>
      <text:list text:style-name="L6">
        <text:list-item>
          <text:p text:style-name="P11">React </text:p>
        </text:list-item>
        <text:list-item>
          <text:p text:style-name="P12">React Router </text:p>
        </text:list-item>
      </text:list>
      <text:h text:style-name="Heading_20_3" text:outline-level="3">Backend (CRUD obligatoire)</text:h>
      <text:list text:style-name="L7">
        <text:list-item>
          <text:p text:style-name="P13">JSON Server<text:line-break/>ou Node/Express </text:p>
        </text:list-item>
      </text:list>
      <text:h text:style-name="Heading_20_3" text:outline-level="3">Déploiement</text:h>
      <text:list text:style-name="L8">
        <text:list-item>
          <text:p text:style-name="P14">Vercel (front) </text:p>
        </text:list-item>
        <text:list-item>
          <text:p text:style-name="P15">Render (API) </text:p>
        </text:list-item>
      </text:list>
      <text:p text:style-name="Horizontal_20_Line"/>
      <text:h text:style-name="Heading_20_2" text:outline-level="2"><text:soft-page-break/>🔌 API externe (lecture seule)</text:h>
      <text:h text:style-name="Heading_20_3" text:outline-level="3">OpenWeather API</text:h>
      <text:list text:style-name="L9">
        <text:list-item>
          <text:p text:style-name="P16">météo du lieu </text:p>
        </text:list-item>
        <text:list-item>
          <text:p text:style-name="P17">conditions par jour de voyage </text:p>
        </text:list-item>
      </text:list>
      <text:p text:style-name="Text_20_body">👉 API non critique → enrichissement UX</text:p>
      <text:p text:style-name="Horizontal_20_Line"/>
      <text:h text:style-name="Heading_20_2" text:outline-level="2">🧩 CRUD (OBLIGATOIRE ÉCOLE)</text:h>
      <text:p text:style-name="Text_20_body">Tu dois avoir un vrai backend avec :</text:p>
      <text:list text:style-name="L10">
        <text:list-item>
          <text:p text:style-name="P18">Trips (voyages) </text:p>
        </text:list-item>
        <text:list-item>
          <text:p text:style-name="P18">Activities (activités) </text:p>
        </text:list-item>
        <text:list-item>
          <text:p text:style-name="P19">Notes / budget </text:p>
        </text:list-item>
      </text:list>
      <text:p text:style-name="Text_20_body">Opérations :</text:p>
      <text:list text:style-name="L11">
        <text:list-item>
          <text:p text:style-name="P20">Create → créer un voyage </text:p>
        </text:list-item>
        <text:list-item>
          <text:p text:style-name="P20">Read → dashboard + détail </text:p>
        </text:list-item>
        <text:list-item>
          <text:p text:style-name="P20">Update → modifier planning </text:p>
        </text:list-item>
        <text:list-item>
          <text:p text:style-name="P21">Delete → supprimer </text:p>
        </text:list-item>
      </text:list>
      <text:p text:style-name="Horizontal_20_Line"/>
      <text:h text:style-name="Heading_20_1" text:outline-level="1">🖥️ 5. VUES (SPA REACT)</text:h>
      <text:p text:style-name="Text_20_body">Minimum requis :</text:p>
      <text:list text:style-name="L12">
        <text:list-item>
          <text:p text:style-name="P22">Dashboard (liste voyages) </text:p>
        </text:list-item>
        <text:list-item>
          <text:p text:style-name="P22">Page détail voyage (planning jour par jour) </text:p>
        </text:list-item>
        <text:list-item>
          <text:p text:style-name="P23">Formulaire création / édition </text:p>
        </text:list-item>
      </text:list>
      <text:p text:style-name="Text_20_body">Bonus :</text:p>
      <text:list text:style-name="L13">
        <text:list-item>
          <text:p text:style-name="P24">page météo intégrée </text:p>
        </text:list-item>
        <text:list-item>
          <text:p text:style-name="P25">page “suggestions activités” </text:p>
        </text:list-item>
      </text:list>
      <text:p text:style-name="Horizontal_20_Line"/>
      <text:h text:style-name="Heading_20_1" text:outline-level="1">⚡ 6. DIFFICULTÉS TECHNIQUES</text:h>
      <text:h text:style-name="Heading_20_2" text:outline-level="2">⚠️ Points faciles</text:h>
      <text:list text:style-name="L14">
        <text:list-item>
          <text:p text:style-name="P26">CRUD avec JSON Server → simple </text:p>
        </text:list-item>
        <text:list-item>
          <text:p text:style-name="P26">React SPA → standard </text:p>
        </text:list-item>
        <text:list-item>
          <text:p text:style-name="P27">Routing → classique </text:p>
        </text:list-item>
      </text:list>
      <text:h text:style-name="Heading_20_2" text:outline-level="2"><text:soft-page-break/>⚠️ Points moyens</text:h>
      <text:list text:style-name="L15">
        <text:list-item>
          <text:p text:style-name="P28">structurer un itinéraire logique </text:p>
        </text:list-item>
        <text:list-item>
          <text:p text:style-name="P29">gestion des dates / jours </text:p>
        </text:list-item>
      </text:list>
      <text:h text:style-name="Heading_20_2" text:outline-level="2">⚠️ Points à éviter (risques projet)</text:h>
      <text:list text:style-name="L16">
        <text:list-item>
          <text:p text:style-name="P30">trop d’API externes </text:p>
        </text:list-item>
        <text:list-item>
          <text:p text:style-name="P30">système de booking complexe </text:p>
        </text:list-item>
        <text:list-item>
          <text:p text:style-name="P31">authentification (inutile en 8 jours) </text:p>
        </text:list-item>
      </text:list>
      <text:p text:style-name="Horizontal_20_Line"/>
      <text:h text:style-name="Heading_20_1" text:outline-level="1">🧠 7. PEUT-ON TOUT AUTOMATISER ?</text:h>
      <text:h text:style-name="Heading_20_2" text:outline-level="2">✔ Oui à 80–90%</text:h>
      <text:p text:style-name="Text_20_body">Tu peux automatiser :</text:p>
      <text:list text:style-name="L17">
        <text:list-item>
          <text:p text:style-name="P32">météo (API) </text:p>
        </text:list-item>
        <text:list-item>
          <text:p text:style-name="P32">suggestions basiques (logique simple) </text:p>
        </text:list-item>
        <text:list-item>
          <text:p text:style-name="P33">génération structure jour 1 / jour 2 / jour 3 </text:p>
        </text:list-item>
      </text:list>
      <text:h text:style-name="Heading_20_2" text:outline-level="2">❌ Non recommandé en 8 jours :</text:h>
      <text:list text:style-name="L18">
        <text:list-item>
          <text:p text:style-name="P34">IA complexe </text:p>
        </text:list-item>
        <text:list-item>
          <text:p text:style-name="P34">scraping avancé </text:p>
        </text:list-item>
        <text:list-item>
          <text:p text:style-name="P35">synchronisation booking </text:p>
        </text:list-item>
      </text:list>
      <text:p text:style-name="Text_20_body">👉 Conclusion :<text:line-break/><text:span text:style-name="Strong_20_Emphasis">MVP = semi-automatique, pas full AI</text:span></text:p>
      <text:p text:style-name="Horizontal_20_Line"/>
      <text:h text:style-name="Heading_20_1" text:outline-level="1">💰 8. MONÉTISATION (SIDE HUSTLE)</text:h>
      <text:h text:style-name="Heading_20_2" text:outline-level="2">🥇 Modèle 1 — Freemium (RECOMMANDÉ)</text:h>
      <text:list text:style-name="L19">
        <text:list-item>
          <text:p text:style-name="P36">gratuit : 1 voyage </text:p>
        </text:list-item>
        <text:list-item>
          <text:p text:style-name="P37">payant : voyages illimités + export PDF + météo avancée </text:p>
        </text:list-item>
      </text:list>
      <text:p text:style-name="Text_20_body">👉 prix potentiel : 3€–10€/mois</text:p>
      <text:p text:style-name="Horizontal_20_Line"/>
      <text:h text:style-name="Heading_20_2" text:outline-level="2">🥈 Modèle 2 — One-shot</text:h>
      <text:list text:style-name="L20">
        <text:list-item>
          <text:p text:style-name="P38">paiement unique (ex: 5€–15€) </text:p>
        </text:list-item>
        <text:list-item>
          <text:p text:style-name="P39">accès à version premium </text:p>
        </text:list-item>
      </text:list>
      <text:p text:style-name="Text_20_body"><text:soft-page-break/>👉 plus simple à lancer</text:p>
      <text:p text:style-name="Horizontal_20_Line"/>
      <text:h text:style-name="Heading_20_2" text:outline-level="2">🥉 Modèle 3 — Affiliate (long terme)</text:h>
      <text:list text:style-name="L21">
        <text:list-item>
          <text:p text:style-name="P40">hôtels </text:p>
        </text:list-item>
        <text:list-item>
          <text:p text:style-name="P40">activités </text:p>
        </text:list-item>
        <text:list-item>
          <text:p text:style-name="P41">vols </text:p>
        </text:list-item>
      </text:list>
      <text:p text:style-name="Text_20_body">👉 potentiel élevé mais pas immédiat</text:p>
      <text:p text:style-name="Horizontal_20_Line"/>
      <text:h text:style-name="Heading_20_1" text:outline-level="1">🚀 9. DIFFICULTÉ GLOBALE (8 JOURS)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Bloc</text:p>
            </table:table-cell>
            <table:table-cell table:style-name="Tableau1.A1" office:value-type="string">
              <text:p text:style-name="Table_20_Heading">Difficulté</text:p>
            </table:table-cell>
          </table:table-row>
        </table:table-header-rows>
        <table:table-row>
          <table:table-cell table:style-name="Tableau1.A1" office:value-type="string">
            <text:p text:style-name="Table_20_Contents">Front React</text:p>
          </table:table-cell>
          <table:table-cell table:style-name="Tableau1.A1" office:value-type="string">
            <text:p text:style-name="Table_20_Contents">⭐⭐</text:p>
          </table:table-cell>
        </table:table-row>
        <table:table-row>
          <table:table-cell table:style-name="Tableau1.A1" office:value-type="string">
            <text:p text:style-name="Table_20_Contents">CRUD backend</text:p>
          </table:table-cell>
          <table:table-cell table:style-name="Tableau1.A1" office:value-type="string">
            <text:p text:style-name="Table_20_Contents">⭐⭐</text:p>
          </table:table-cell>
        </table:table-row>
        <table:table-row>
          <table:table-cell table:style-name="Tableau1.A1" office:value-type="string">
            <text:p text:style-name="Table_20_Contents">API météo</text:p>
          </table:table-cell>
          <table:table-cell table:style-name="Tableau1.A1" office:value-type="string">
            <text:p text:style-name="Table_20_Contents">⭐</text:p>
          </table:table-cell>
        </table:table-row>
        <table:table-row>
          <table:table-cell table:style-name="Tableau1.A1" office:value-type="string">
            <text:p text:style-name="Table_20_Contents">logique planning</text:p>
          </table:table-cell>
          <table:table-cell table:style-name="Tableau1.A1" office:value-type="string">
            <text:p text:style-name="Table_20_Contents">⭐⭐⭐</text:p>
          </table:table-cell>
        </table:table-row>
        <table:table-row>
          <table:table-cell table:style-name="Tableau1.A1" office:value-type="string">
            <text:p text:style-name="Table_20_Contents">déploiement</text:p>
          </table:table-cell>
          <table:table-cell table:style-name="Tableau1.A1" office:value-type="string">
            <text:p text:style-name="Table_20_Contents">⭐</text:p>
          </table:table-cell>
        </table:table-row>
      </table:table>
      <text:p text:style-name="Text_20_body">👉 Verdict :<text:line-break/><text:span text:style-name="Strong_20_Emphasis">100% faisable en 8 jours si scope maîtrisé</text:span></text:p>
      <text:p text:style-name="Horizontal_20_Line"/>
      <text:h text:style-name="Heading_20_1" text:outline-level="1">🧾 10. POSITIONNEMENT FINAL</text:h>
      <text:p text:style-name="Text_20_body">👉 Ce projet n’est pas :</text:p>
      <text:list text:style-name="L22">
        <text:list-item>
          <text:p text:style-name="P42">un booking system </text:p>
        </text:list-item>
        <text:list-item>
          <text:p text:style-name="P43">un Google Travel clone </text:p>
        </text:list-item>
      </text:list>
      <text:p text:style-name="Text_20_body">👉 C’est :<text:line-break/><text:span text:style-name="Strong_20_Emphasis">un outil léger de planification intelligente</text:span></text:p>
      <text:p text:style-name="Horizontal_20_Line"/>
      <text:h text:style-name="Heading_20_1" text:outline-level="1">🧠 CONCLUSION STRATÉGIQUE</text:h>
      <text:p text:style-name="Text_20_body">✔ répond aux exigences école (CRUD + SPA + API + déploiement)<text:line-break/>✔ marché existant et validé<text:line-break/>✔ problème réel utilisateur<text:line-break/>✔ scope maîtrisable en 8 jours<text:line-break/>✔ potentiel side hustle réel (freemium)</text:p>
      <text:p text:style-name="Horizontal_20_Line"/>
      <text:p text:style-name="Text_20_body"><text:soft-page-break/>Si tu veux, prochaine étape je peux te faire :<text:line-break/>👉 architecture React complète (components + pages)<text:line-break/>👉 schéma exact des endpoints API<text:line-break/>👉 ou backlog jour par jour pour garantir les 2 commits/jour</text:p>
      <text:p text:style-name="Text_20_body">Dis-moi 👍</text:p>
      <text:section text:style-name="Sect1" text:name="thread-bottom-container">
        <text:p text:style-name="P44"/>
        <text:section text:style-name="Sect1" text:name="thread-bottom">
          <text:p text:style-name="P45">Des réponses plus intelligentes, le chargement de fichiers et d’images, et bien plus encore.</text:p>
          <text:p text:style-name="P46">Se connecter</text:p>
          <text:p text:style-name="Text_20_body">Inscription gratuite</text:p>
          <text:p text:style-name="P46"><text:bookmark text:name="upload-files"/><draw:control text:anchor-type="as-char" draw:z-index="0" draw:name="Forme1" draw:style-name="gr1" draw:text-style-name="P47" svg:width="4.869cm" svg:height="0.609cm" draw:control="control1"/></text:p>
          <text:p text:style-name="P46"><draw:control text:anchor-type="as-char" draw:z-index="1" draw:name="Forme2" draw:style-name="gr2" draw:text-style-name="P48" svg:width="4.737cm" svg:height="0.9cm" draw:control="control2"/></text:p>
          <text:section text:style-name="Sect1" text:name="prompt-textarea">
            <text:p text:style-name="P44"/>
          </text:section>
        </text:section>
      </text:section>
      <text:h text:style-name="Heading_20_1" text:outline-level="1">🧭 TRAVEL PLANNER APP — REVUE 360° (MVP 8 JOURS)</text:h>
      <text:h text:style-name="Heading_20_2" text:outline-level="2">🧩 1. CONCEPT PRODUIT</text:h>
      <text:p text:style-name="Text_20_body">Application SPA permettant de :</text:p>
      <text:list text:style-name="L23">
        <text:list-item>
          <text:p text:style-name="P49">créer des voyages (trips) </text:p>
        </text:list-item>
        <text:list-item>
          <text:p text:style-name="P49">générer un itinéraire structuré </text:p>
        </text:list-item>
        <text:list-item>
          <text:p text:style-name="P49">enrichir le voyage avec données externes (météo, lieux) </text:p>
        </text:list-item>
        <text:list-item>
          <text:p text:style-name="P50">organiser activités jour par jour </text:p>
        </text:list-item>
      </text:list>
      <text:p text:style-name="Text_20_body">👉 Positionnement :<text:line-break/><text:span text:style-name="Strong_20_Emphasis">“Planifier un voyage en 5 minutes, pas en 5 heures”</text:span></text:p>
      <text:p text:style-name="Horizontal_20_Line"/>
      <text:h text:style-name="Heading_20_1" text:outline-level="1">🌍 2. MARCHÉ &amp; DEMANDE (VALIDATION BUSINESS)</text:h>
      <text:h text:style-name="Heading_20_2" text:outline-level="2">📈 Demande forte et croissante</text:h>
      <text:list text:style-name="L24">
        <text:list-item>
          <text:p text:style-name="P51">Le marché des apps de voyage dépasse plusieurs milliards et continue de croître fortement (~11% CAGR) </text:p>
        </text:list-item>
        <text:list-item>
          <text:p text:style-name="P51">Les apps de voyage sont devenues un standard : les utilisateurs utilisent 7 à 8 apps pour planifier un voyage </text:p>
        </text:list-item>
        <text:list-item>
          <text:p text:style-name="P52">Forte tendance vers la <text:span text:style-name="Strong_20_Emphasis">planification automatisée et personnalisée</text:span> </text:p>
        </text:list-item>
      </text:list>
      <text:h text:style-name="Heading_20_2" text:outline-level="2"><text:soft-page-break/>🔥 Problème utilisateur réel</text:h>
      <text:list text:style-name="L25">
        <text:list-item>
          <text:p text:style-name="P53">trop d’onglets / outils (Google, Maps, Airbnb, blogs) </text:p>
        </text:list-item>
        <text:list-item>
          <text:p text:style-name="P53">difficulté à structurer un itinéraire cohérent </text:p>
        </text:list-item>
        <text:list-item>
          <text:p text:style-name="P54">perte de temps importante (pain point constant) </text:p>
        </text:list-item>
      </text:list>
      <text:p text:style-name="Text_20_body">👉 Insight clé :</text:p>
      <text:p text:style-name="Quotations">Le problème n’est pas “trouver des idées de voyage”, mais <text:span text:style-name="Strong_20_Emphasis">les organiser intelligemment</text:span></text:p>
      <text:p text:style-name="Horizontal_20_Line"/>
      <text:h text:style-name="Heading_20_1" text:outline-level="1">🏁 3. CONCURRENCE</text:h>
      <text:h text:style-name="Heading_20_2" text:outline-level="2">🥇 Acteurs dominants</text:h>
      <text:list text:style-name="L26">
        <text:list-item>
          <text:p text:style-name="P55">Google Travel </text:p>
        </text:list-item>
        <text:list-item>
          <text:p text:style-name="P55">TripIt </text:p>
        </text:list-item>
        <text:list-item>
          <text:p text:style-name="P55">Kayak </text:p>
        </text:list-item>
        <text:list-item>
          <text:p text:style-name="P55">Skyscanner </text:p>
        </text:list-item>
        <text:list-item>
          <text:p text:style-name="P56">Airbnb Experiences </text:p>
        </text:list-item>
      </text:list>
      <text:h text:style-name="Heading_20_2" text:outline-level="2">⚠️ Analyse concurrence</text:h>
      <text:p text:style-name="Text_20_body">✔ marché <text:span text:style-name="Strong_20_Emphasis">très concurrentiel</text:span><text:line-break/>✔ dominé par grosses plateformes</text:p>
      <text:p text:style-name="Text_20_body">MAIS :</text:p>
      <text:list text:style-name="L27">
        <text:list-item>
          <text:p text:style-name="P57">outils existants = souvent <text:span text:style-name="Strong_20_Emphasis">complexes ou orientés booking</text:span> </text:p>
        </text:list-item>
        <text:list-item>
          <text:p text:style-name="P57">peu d’outils simples “MVP + organisation légère” </text:p>
        </text:list-item>
        <text:list-item>
          <text:p text:style-name="P58">manque d’UX simple pour utilisateurs non experts </text:p>
        </text:list-item>
      </text:list>
      <text:p text:style-name="Text_20_body">👉 Opportunité :<text:line-break/><text:span text:style-name="Strong_20_Emphasis">micro-outil spécialisé = niche exploitable</text:span></text:p>
      <text:p text:style-name="Horizontal_20_Line"/>
      <text:h text:style-name="Heading_20_1" text:outline-level="1">⚙️ 4. SOLUTION TECHNIQUE (IMPORTANT POUR TON ÉCOLE)</text:h>
      <text:h text:style-name="Heading_20_2" text:outline-level="2">🧱 Architecture</text:h>
      <text:h text:style-name="Heading_20_3" text:outline-level="3">Frontend</text:h>
      <text:list text:style-name="L28">
        <text:list-item>
          <text:p text:style-name="P59">React </text:p>
        </text:list-item>
        <text:list-item>
          <text:p text:style-name="P60">React Router </text:p>
        </text:list-item>
      </text:list>
      <text:h text:style-name="Heading_20_3" text:outline-level="3"><text:soft-page-break/>Backend (CRUD obligatoire)</text:h>
      <text:list text:style-name="L29">
        <text:list-item>
          <text:p text:style-name="P61">JSON Server<text:line-break/>ou Node/Express </text:p>
        </text:list-item>
      </text:list>
      <text:h text:style-name="Heading_20_3" text:outline-level="3">Déploiement</text:h>
      <text:list text:style-name="L30">
        <text:list-item>
          <text:p text:style-name="P62">Vercel (front) </text:p>
        </text:list-item>
        <text:list-item>
          <text:p text:style-name="P63">Render (API) </text:p>
        </text:list-item>
      </text:list>
      <text:p text:style-name="Horizontal_20_Line"/>
      <text:h text:style-name="Heading_20_2" text:outline-level="2">🔌 API externe (lecture seule)</text:h>
      <text:h text:style-name="Heading_20_3" text:outline-level="3">OpenWeather API</text:h>
      <text:list text:style-name="L31">
        <text:list-item>
          <text:p text:style-name="P64">météo du lieu </text:p>
        </text:list-item>
        <text:list-item>
          <text:p text:style-name="P65">conditions par jour de voyage </text:p>
        </text:list-item>
      </text:list>
      <text:p text:style-name="Text_20_body">👉 API non critique → enrichissement UX</text:p>
      <text:p text:style-name="Horizontal_20_Line"/>
      <text:h text:style-name="Heading_20_2" text:outline-level="2">🧩 CRUD (OBLIGATOIRE ÉCOLE)</text:h>
      <text:p text:style-name="Text_20_body">Tu dois avoir un vrai backend avec :</text:p>
      <text:list text:style-name="L32">
        <text:list-item>
          <text:p text:style-name="P66">Trips (voyages) </text:p>
        </text:list-item>
        <text:list-item>
          <text:p text:style-name="P66">Activities (activités) </text:p>
        </text:list-item>
        <text:list-item>
          <text:p text:style-name="P67">Notes / budget </text:p>
        </text:list-item>
      </text:list>
      <text:p text:style-name="Text_20_body">Opérations :</text:p>
      <text:list text:style-name="L33">
        <text:list-item>
          <text:p text:style-name="P68">Create → créer un voyage </text:p>
        </text:list-item>
        <text:list-item>
          <text:p text:style-name="P68">Read → dashboard + détail </text:p>
        </text:list-item>
        <text:list-item>
          <text:p text:style-name="P68">Update → modifier planning </text:p>
        </text:list-item>
        <text:list-item>
          <text:p text:style-name="P69">Delete → supprimer </text:p>
        </text:list-item>
      </text:list>
      <text:p text:style-name="Horizontal_20_Line"/>
      <text:h text:style-name="Heading_20_1" text:outline-level="1">🖥️ 5. VUES (SPA REACT)</text:h>
      <text:p text:style-name="Text_20_body">Minimum requis :</text:p>
      <text:list text:style-name="L34">
        <text:list-item>
          <text:p text:style-name="P70">Dashboard (liste voyages) </text:p>
        </text:list-item>
        <text:list-item>
          <text:p text:style-name="P70">Page détail voyage (planning jour par jour) </text:p>
        </text:list-item>
        <text:list-item>
          <text:p text:style-name="P71">Formulaire création / édition </text:p>
        </text:list-item>
      </text:list>
      <text:p text:style-name="Text_20_body">Bonus :</text:p>
      <text:list text:style-name="L35">
        <text:list-item>
          <text:p text:style-name="P72">page météo intégrée </text:p>
        </text:list-item>
        <text:list-item>
          <text:p text:style-name="P73">page “suggestions activités” </text:p>
        </text:list-item>
      </text:list>
      <text:p text:style-name="Horizontal_20_Line"/>
      <text:h text:style-name="Heading_20_1" text:outline-level="1"><text:soft-page-break/>⚡ 6. DIFFICULTÉS TECHNIQUES</text:h>
      <text:h text:style-name="Heading_20_2" text:outline-level="2">⚠️ Points faciles</text:h>
      <text:list text:style-name="L36">
        <text:list-item>
          <text:p text:style-name="P74">CRUD avec JSON Server → simple </text:p>
        </text:list-item>
        <text:list-item>
          <text:p text:style-name="P74">React SPA → standard </text:p>
        </text:list-item>
        <text:list-item>
          <text:p text:style-name="P75">Routing → classique </text:p>
        </text:list-item>
      </text:list>
      <text:h text:style-name="Heading_20_2" text:outline-level="2">⚠️ Points moyens</text:h>
      <text:list text:style-name="L37">
        <text:list-item>
          <text:p text:style-name="P76">structurer un itinéraire logique </text:p>
        </text:list-item>
        <text:list-item>
          <text:p text:style-name="P77">gestion des dates / jours </text:p>
        </text:list-item>
      </text:list>
      <text:h text:style-name="Heading_20_2" text:outline-level="2">⚠️ Points à éviter (risques projet)</text:h>
      <text:list text:style-name="L38">
        <text:list-item>
          <text:p text:style-name="P78">trop d’API externes </text:p>
        </text:list-item>
        <text:list-item>
          <text:p text:style-name="P78">système de booking complexe </text:p>
        </text:list-item>
        <text:list-item>
          <text:p text:style-name="P79">authentification (inutile en 8 jours) </text:p>
        </text:list-item>
      </text:list>
      <text:p text:style-name="Horizontal_20_Line"/>
      <text:h text:style-name="Heading_20_1" text:outline-level="1">🧠 7. PEUT-ON TOUT AUTOMATISER ?</text:h>
      <text:h text:style-name="Heading_20_2" text:outline-level="2">✔ Oui à 80–90%</text:h>
      <text:p text:style-name="Text_20_body">Tu peux automatiser :</text:p>
      <text:list text:style-name="L39">
        <text:list-item>
          <text:p text:style-name="P80">météo (API) </text:p>
        </text:list-item>
        <text:list-item>
          <text:p text:style-name="P80">suggestions basiques (logique simple) </text:p>
        </text:list-item>
        <text:list-item>
          <text:p text:style-name="P81">génération structure jour 1 / jour 2 / jour 3 </text:p>
        </text:list-item>
      </text:list>
      <text:h text:style-name="Heading_20_2" text:outline-level="2">❌ Non recommandé en 8 jours :</text:h>
      <text:list text:style-name="L40">
        <text:list-item>
          <text:p text:style-name="P82">IA complexe </text:p>
        </text:list-item>
        <text:list-item>
          <text:p text:style-name="P82">scraping avancé </text:p>
        </text:list-item>
        <text:list-item>
          <text:p text:style-name="P83">synchronisation booking </text:p>
        </text:list-item>
      </text:list>
      <text:p text:style-name="Text_20_body">👉 Conclusion :<text:line-break/><text:span text:style-name="Strong_20_Emphasis">MVP = semi-automatique, pas full AI</text:span></text:p>
      <text:p text:style-name="Horizontal_20_Line"/>
      <text:h text:style-name="Heading_20_1" text:outline-level="1">💰 8. MONÉTISATION (SIDE HUSTLE)</text:h>
      <text:h text:style-name="Heading_20_2" text:outline-level="2">🥇 Modèle 1 — Freemium (RECOMMANDÉ)</text:h>
      <text:list text:style-name="L41">
        <text:list-item>
          <text:p text:style-name="P84">gratuit : 1 voyage </text:p>
        </text:list-item>
        <text:list-item>
          <text:p text:style-name="P85"><text:soft-page-break/>payant : voyages illimités + export PDF + météo avancée </text:p>
        </text:list-item>
      </text:list>
      <text:p text:style-name="Text_20_body">👉 prix potentiel : 3€–10€/mois</text:p>
      <text:p text:style-name="Horizontal_20_Line"/>
      <text:h text:style-name="Heading_20_2" text:outline-level="2">🥈 Modèle 2 — One-shot</text:h>
      <text:list text:style-name="L42">
        <text:list-item>
          <text:p text:style-name="P86">paiement unique (ex: 5€–15€) </text:p>
        </text:list-item>
        <text:list-item>
          <text:p text:style-name="P87">accès à version premium </text:p>
        </text:list-item>
      </text:list>
      <text:p text:style-name="Text_20_body">👉 plus simple à lancer</text:p>
      <text:p text:style-name="Horizontal_20_Line"/>
      <text:h text:style-name="Heading_20_2" text:outline-level="2">🥉 Modèle 3 — Affiliate (long terme)</text:h>
      <text:list text:style-name="L43">
        <text:list-item>
          <text:p text:style-name="P88">hôtels </text:p>
        </text:list-item>
        <text:list-item>
          <text:p text:style-name="P88">activités </text:p>
        </text:list-item>
        <text:list-item>
          <text:p text:style-name="P89">vols </text:p>
        </text:list-item>
      </text:list>
      <text:p text:style-name="Text_20_body">👉 potentiel élevé mais pas immédiat</text:p>
      <text:p text:style-name="Horizontal_20_Line"/>
      <text:h text:style-name="Heading_20_1" text:outline-level="1">🚀 9. DIFFICULTÉ GLOBALE (8 JOURS)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Bloc</text:p>
            </table:table-cell>
            <table:table-cell table:style-name="Tableau2.A1" office:value-type="string">
              <text:p text:style-name="Table_20_Heading">Difficulté</text:p>
            </table:table-cell>
          </table:table-row>
        </table:table-header-rows>
        <table:table-row>
          <table:table-cell table:style-name="Tableau2.A1" office:value-type="string">
            <text:p text:style-name="Table_20_Contents">Front React</text:p>
          </table:table-cell>
          <table:table-cell table:style-name="Tableau2.A1" office:value-type="string">
            <text:p text:style-name="Table_20_Contents">⭐⭐</text:p>
          </table:table-cell>
        </table:table-row>
        <table:table-row>
          <table:table-cell table:style-name="Tableau2.A1" office:value-type="string">
            <text:p text:style-name="Table_20_Contents">CRUD backend</text:p>
          </table:table-cell>
          <table:table-cell table:style-name="Tableau2.A1" office:value-type="string">
            <text:p text:style-name="Table_20_Contents">⭐⭐</text:p>
          </table:table-cell>
        </table:table-row>
        <table:table-row>
          <table:table-cell table:style-name="Tableau2.A1" office:value-type="string">
            <text:p text:style-name="Table_20_Contents">API météo</text:p>
          </table:table-cell>
          <table:table-cell table:style-name="Tableau2.A1" office:value-type="string">
            <text:p text:style-name="Table_20_Contents">⭐</text:p>
          </table:table-cell>
        </table:table-row>
        <table:table-row>
          <table:table-cell table:style-name="Tableau2.A1" office:value-type="string">
            <text:p text:style-name="Table_20_Contents">logique planning</text:p>
          </table:table-cell>
          <table:table-cell table:style-name="Tableau2.A1" office:value-type="string">
            <text:p text:style-name="Table_20_Contents">⭐⭐⭐</text:p>
          </table:table-cell>
        </table:table-row>
        <table:table-row>
          <table:table-cell table:style-name="Tableau2.A1" office:value-type="string">
            <text:p text:style-name="Table_20_Contents">déploiement</text:p>
          </table:table-cell>
          <table:table-cell table:style-name="Tableau2.A1" office:value-type="string">
            <text:p text:style-name="Table_20_Contents">⭐</text:p>
          </table:table-cell>
        </table:table-row>
      </table:table>
      <text:p text:style-name="Text_20_body">👉 Verdict :<text:line-break/><text:span text:style-name="Strong_20_Emphasis">100% faisable en 8 jours si scope maîtrisé</text:span></text:p>
      <text:p text:style-name="Horizontal_20_Line"/>
      <text:h text:style-name="Heading_20_1" text:outline-level="1">🧾 10. POSITIONNEMENT FINAL</text:h>
      <text:p text:style-name="Text_20_body">👉 Ce projet n’est pas :</text:p>
      <text:list text:style-name="L44">
        <text:list-item>
          <text:p text:style-name="P90">un booking system </text:p>
        </text:list-item>
        <text:list-item>
          <text:p text:style-name="P91">un Google Travel clone </text:p>
        </text:list-item>
      </text:list>
      <text:p text:style-name="Text_20_body">👉 C’est :<text:line-break/><text:span text:style-name="Strong_20_Emphasis">un outil léger de planification intelligente</text:span></text:p>
      <text:p text:style-name="Horizontal_20_Line"/>
      <text:h text:style-name="Heading_20_1" text:outline-level="1"><text:soft-page-break/>🧠 CONCLUSION STRATÉGIQUE</text:h>
      <text:p text:style-name="Text_20_body">✔ répond aux exigences école (CRUD + SPA + API + déploiement)<text:line-break/>✔ marché existant et validé<text:line-break/>✔ problème réel utilisateur<text:line-break/>✔ scope maîtrisable en 8 jours<text:line-break/>✔ potentiel side hustle réel (freemium)</text:p>
      <text:p text:style-name="Horizontal_20_Line"/>
      <text:p text:style-name="Text_20_body">Si tu veux, prochaine étape je peux te faire :<text:line-break/>👉 architecture React complète (components + pages)<text:line-break/>👉 schéma exact des endpoints API<text:line-break/>👉 ou backlog jour par jour pour garantir les 2 commits/jour</text:p>
      <text:p text:style-name="Text_20_body">Dis-moi 👍</text:p>
      <text:section text:style-name="Sect1" text:name="Section1">
        <text:p text:style-name="P44"><text:bookmark text:name="thread-bottom-container"/></text:p>
        <text:section text:style-name="Sect1" text:name="Section2">
          <text:p text:style-name="P45"><text:bookmark text:name="thread-bottom"/>Des réponses plus intelligentes, le chargement de fichiers et d’images, et bien plus encore.</text:p>
          <text:p text:style-name="P46">Se connecter</text:p>
          <text:p text:style-name="Text_20_body">Inscription gratuite</text:p>
          <text:p text:style-name="P46"><text:bookmark text:name="upload-files Copie 1"/><draw:control text:anchor-type="as-char" draw:z-index="2" draw:name="Forme3" draw:style-name="gr1" draw:text-style-name="P47" svg:width="4.869cm" svg:height="0.609cm" draw:control="control3"/></text:p>
          <text:p text:style-name="P46"><draw:control text:anchor-type="as-char" draw:z-index="3" draw:name="Forme4" draw:style-name="gr2" draw:text-style-name="P48" svg:width="4.737cm" svg:height="0.9cm" draw:control="control4"/></text:p>
          <text:section text:style-name="Sect1" text:name="Section3">
            <text:p text:style-name="P44"><text:bookmark text:name="prompt-textarea"/></text:p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11:53:39.521412700</meta:creation-date>
    <dc:date>2026-05-01T15:02:57.838845000</dc:date>
    <meta:editing-duration>PT2H12M32S</meta:editing-duration>
    <meta:editing-cycles>1</meta:editing-cycles>
    <meta:document-statistic meta:table-count="2" meta:image-count="0" meta:object-count="0" meta:page-count="11" meta:paragraph-count="262" meta:word-count="1396" meta:character-count="7862" meta:non-whitespace-character-count="6722"/>
    <meta:generator>LibreOffice/26.2.2.2$Windows_X86_64 LibreOffice_project/1f77d10d6938fd34972958f64b2bcfa54f8b1ba5</meta:generator>
  </office:meta>
</office:document-meta>
</file>